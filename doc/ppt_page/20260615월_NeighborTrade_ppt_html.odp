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F0000002DFA699647C.png"/>
  <manifest:file-entry manifest:media-type="image/png" manifest:full-path="Pictures/10000201000006EB0000027AB5000835.png"/>
  <manifest:file-entry manifest:media-type="image/png" manifest:full-path="Pictures/10000201000006F7000002A4EEDA2119.png"/>
  <manifest:file-entry manifest:media-type="image/png" manifest:full-path="Pictures/10000201000006E1000002DCF294528E.png"/>
  <manifest:file-entry manifest:media-type="image/png" manifest:full-path="Pictures/10000201000006F100000274F9085CA4.png"/>
  <manifest:file-entry manifest:media-type="image/png" manifest:full-path="Pictures/10000201000006F10000031B38D225DD.png"/>
  <manifest:file-entry manifest:media-type="image/png" manifest:full-path="Pictures/10000201000006E1000002D33263EC3E.png"/>
  <manifest:file-entry manifest:media-type="image/png" manifest:full-path="Pictures/10000201000006DC00000337BA46E77E.png"/>
  <manifest:file-entry manifest:media-type="image/png" manifest:full-path="Pictures/10000201000006EA000002A9A2FB043A.png"/>
  <manifest:file-entry manifest:media-type="image/png" manifest:full-path="Pictures/10000201000006FA000002F7D7CD3816.png"/>
  <manifest:file-entry manifest:media-type="image/png" manifest:full-path="Pictures/10000201000006E7000003408651E4B0.png"/>
  <manifest:file-entry manifest:media-type="image/png" manifest:full-path="Pictures/10000201000006F00000033C5A59368B.png"/>
  <manifest:file-entry manifest:media-type="image/png" manifest:full-path="Pictures/10000201000006FD0000030A47350B6B.png"/>
  <manifest:file-entry manifest:media-type="image/png" manifest:full-path="Pictures/10000201000006F1000002928C201BF5.png"/>
  <manifest:file-entry manifest:media-type="image/png" manifest:full-path="Pictures/10000201000006DF000002C50BFF92A6.png"/>
  <manifest:file-entry manifest:media-type="image/png" manifest:full-path="Pictures/10000201000006E8000002BF4AD97DCE.png"/>
  <manifest:file-entry manifest:media-type="image/png" manifest:full-path="Pictures/10000201000006F700000336F6EB5B51.png"/>
  <manifest:file-entry manifest:media-type="image/png" manifest:full-path="Pictures/10000201000006E5000002C871334AB5.png"/>
  <manifest:file-entry manifest:media-type="image/png" manifest:full-path="Pictures/10000201000006FD0000028FF73D0285.png"/>
  <manifest:file-entry manifest:media-type="image/png" manifest:full-path="Pictures/10000201000006FA000002D950215EFC.png"/>
  <manifest:file-entry manifest:media-type="image/png" manifest:full-path="Pictures/10000201000006F7000002AA71D4CCE5.png"/>
  <manifest:file-entry manifest:media-type="image/png" manifest:full-path="Pictures/10000201000006EA0000033C94DB0EAB.png"/>
  <manifest:file-entry manifest:media-type="image/png" manifest:full-path="Pictures/10000201000006E500000307157182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10.771cm" svg:x="0cm" svg:y="2cm">
          <draw:image xlink:href="Pictures/10000201000006EA000002A9A2FB04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7.999cm" svg:height="9.894cm" svg:x="0.001cm" svg:y="2.906cm">
          <draw:image xlink:href="Pictures/10000201000006F100000274F9085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1" draw:text-style-name="P1" draw:layer="layout" svg:width="27.999cm" svg:height="11.132cm" svg:x="0.001cm" svg:y="3.8cm">
          <draw:image xlink:href="Pictures/10000201000006E8000002BF4AD97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" draw:text-style-name="P1" draw:layer="layout" svg:width="27.999cm" svg:height="13.052cm" svg:x="-0.799cm" svg:y="1.4cm">
          <draw:image xlink:href="Pictures/10000201000006F00000033C5A5936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" draw:text-style-name="P1" draw:layer="layout" svg:width="27.999cm" svg:height="10.709cm" svg:x="3.005cm" svg:y="4.603cm">
          <draw:image xlink:href="Pictures/10000201000006F7000002AA71D4C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style-name="gr1" draw:text-style-name="P1" draw:layer="layout" svg:width="27.999cm" svg:height="11.427cm" svg:x="-0.198cm" svg:y="3.201cm">
          <draw:image xlink:href="Pictures/10000201000006FA000002D950215E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" draw:text-style-name="P1" draw:layer="layout" svg:width="27.999cm" svg:height="11.586cm" svg:x="0.001cm" svg:y="3.014cm">
          <draw:image xlink:href="Pictures/10000201000006F0000002DFA69964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draw:style-name="gr1" draw:text-style-name="P1" draw:layer="layout" svg:width="27.999cm" svg:height="10.25cm" svg:x="0cm" svg:y="4.55cm">
          <draw:image xlink:href="Pictures/10000201000006FD0000028FF73D0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style-name="gr1" draw:text-style-name="P1" draw:layer="layout" svg:width="27.999cm" svg:height="13.121cm" svg:x="-0.17cm" svg:y="3.806cm">
          <draw:image xlink:href="Pictures/10000201000006DC00000337BA46E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draw:style-name="gr1" draw:text-style-name="P1" draw:layer="layout" svg:width="27.999cm" svg:height="12.293cm" svg:x="-1.926cm" svg:y="3.378cm">
          <draw:image xlink:href="Pictures/10000201000006E50000030715718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draw:style-name="gr1" draw:text-style-name="P1" draw:layer="layout" svg:width="27.999cm" svg:height="11.284cm" svg:x="3.077cm" svg:y="2.704cm">
          <draw:image xlink:href="Pictures/10000201000006DF000002C50BFF92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frame draw:style-name="gr1" draw:text-style-name="P1" draw:layer="layout" svg:width="27.999cm" svg:height="11.494cm" svg:x="-1.95cm" svg:y="1.709cm">
          <draw:image xlink:href="Pictures/10000201000006E1000002D33263E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frame draw:style-name="gr1" draw:text-style-name="P1" draw:layer="layout" svg:width="27.999cm" svg:height="13.097cm" svg:x="-0.242cm" svg:y="3.24cm">
          <draw:image xlink:href="Pictures/10000201000006EA0000033C94DB0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draw:frame draw:style-name="gr1" draw:text-style-name="P1" draw:layer="layout" svg:width="27.999cm" svg:height="11.637cm" svg:x="-1.685cm" svg:y="1.878cm">
          <draw:image xlink:href="Pictures/10000201000006E1000002DCF29452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draw:frame draw:style-name="gr1" draw:text-style-name="P1" draw:layer="layout" svg:width="27.999cm" svg:height="13.182cm" svg:x="-1.733cm" svg:y="2.886cm">
          <draw:image xlink:href="Pictures/10000201000006E7000003408651E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draw:frame draw:style-name="gr1" draw:text-style-name="P1" draw:layer="layout" svg:width="27.999cm" svg:height="10.614cm" svg:x="-2.888cm" svg:y="3.544cm">
          <draw:image xlink:href="Pictures/10000201000006F7000002A4EEDA2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draw:frame draw:style-name="gr1" draw:text-style-name="P1" draw:layer="layout" svg:width="27.999cm" svg:height="11.293cm" svg:x="-3.201cm" svg:y="4.96cm">
          <draw:image xlink:href="Pictures/10000201000006E5000002C871334A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0">
        <draw:frame draw:style-name="gr1" draw:text-style-name="P1" draw:layer="layout" svg:width="27.999cm" svg:height="10.022cm" svg:x="-1.83cm" svg:y="3.936cm">
          <draw:image xlink:href="Pictures/10000201000006EB0000027AB50008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0">
        <draw:frame draw:style-name="gr1" draw:text-style-name="P1" draw:layer="layout" svg:width="27.999cm" svg:height="10.367cm" svg:x="-0.627cm" svg:y="3.09cm">
          <draw:image xlink:href="Pictures/10000201000006F1000002928C201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1T0">
        <draw:frame draw:style-name="gr1" draw:text-style-name="P1" draw:layer="layout" svg:width="27.999cm" svg:height="12.907cm" svg:x="-5.197cm" svg:y="4.538cm">
          <draw:image xlink:href="Pictures/10000201000006F700000336F6EB5B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1T0">
        <draw:frame draw:style-name="gr1" draw:text-style-name="P1" draw:layer="layout" svg:width="27.999cm" svg:height="12.525cm" svg:x="3.318cm" svg:y="2.54cm">
          <draw:image xlink:href="Pictures/10000201000006F10000031B38D22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1T0">
        <draw:frame draw:style-name="gr1" draw:text-style-name="P1" draw:layer="layout" svg:width="27.999cm" svg:height="12.175cm" svg:x="-3.826cm" svg:y="1.681cm">
          <draw:image xlink:href="Pictures/10000201000006FD0000030A47350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1T0">
        <draw:frame draw:style-name="gr1" draw:text-style-name="P1" draw:layer="layout" svg:width="27.999cm" svg:height="11.897cm" svg:x="-1.445cm" svg:y="4.923cm">
          <draw:image xlink:href="Pictures/10000201000006FA000002F7D7CD38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" presentation:presentation-page-layout-name="AL1T0"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yun park</meta:initial-creator>
    <meta:creation-date>2026-06-19T07:18:32.19</meta:creation-date>
    <meta:editing-duration>PT8M20S</meta:editing-duration>
    <meta:editing-cycles>2</meta:editing-cycles>
    <dc:date>2026-06-19T07:42:02.33</dc:date>
    <dc:creator>phyun park</dc:creator>
    <meta:document-statistic meta:object-count="96"/>
    <meta:generator>OpenOffice/4.1.16$Win32 OpenOffice.org_project/4116m3$Build-9816</meta:generator>
  </office:meta>
</office:document-meta>
</file>