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6F0000002DFA699647C.png"/>
  <manifest:file-entry manifest:media-type="image/png" manifest:full-path="Pictures/10000201000006EB0000027AB5000835.png"/>
  <manifest:file-entry manifest:media-type="image/png" manifest:full-path="Pictures/10000201000006F7000002A4EEDA2119.png"/>
  <manifest:file-entry manifest:media-type="image/png" manifest:full-path="Pictures/10000201000006E1000002DCF294528E.png"/>
  <manifest:file-entry manifest:media-type="image/png" manifest:full-path="Pictures/10000201000006F100000274F9085CA4.png"/>
  <manifest:file-entry manifest:media-type="image/png" manifest:full-path="Pictures/10000201000006F10000031B38D225DD.png"/>
  <manifest:file-entry manifest:media-type="image/png" manifest:full-path="Pictures/10000201000006E1000002D33263EC3E.png"/>
  <manifest:file-entry manifest:media-type="image/png" manifest:full-path="Pictures/10000201000006DC00000337BA46E77E.png"/>
  <manifest:file-entry manifest:media-type="image/png" manifest:full-path="Pictures/1000000000000502000002D0EEC217A9.png"/>
  <manifest:file-entry manifest:media-type="image/png" manifest:full-path="Pictures/10000201000006FA000002F7D7CD3816.png"/>
  <manifest:file-entry manifest:media-type="image/png" manifest:full-path="Pictures/10000201000006E7000003408651E4B0.png"/>
  <manifest:file-entry manifest:media-type="image/png" manifest:full-path="Pictures/10000000000004530000056946E581A5.png"/>
  <manifest:file-entry manifest:media-type="image/png" manifest:full-path="Pictures/10000201000006F00000033C5A59368B.png"/>
  <manifest:file-entry manifest:media-type="image/png" manifest:full-path="Pictures/10000201000006FD0000030A47350B6B.png"/>
  <manifest:file-entry manifest:media-type="image/png" manifest:full-path="Pictures/10000201000006F1000002928C201BF5.png"/>
  <manifest:file-entry manifest:media-type="image/png" manifest:full-path="Pictures/10000201000006DF000002C50BFF92A6.png"/>
  <manifest:file-entry manifest:media-type="image/png" manifest:full-path="Pictures/10000201000006E8000002BF4AD97DCE.png"/>
  <manifest:file-entry manifest:media-type="image/png" manifest:full-path="Pictures/10000201000006F700000336F6EB5B51.png"/>
  <manifest:file-entry manifest:media-type="image/png" manifest:full-path="Pictures/10000201000006E5000002C871334AB5.png"/>
  <manifest:file-entry manifest:media-type="image/png" manifest:full-path="Pictures/10000201000006FD0000028FF73D0285.png"/>
  <manifest:file-entry manifest:media-type="image/png" manifest:full-path="Pictures/10000201000006FA000002D950215EFC.png"/>
  <manifest:file-entry manifest:media-type="image/png" manifest:full-path="Pictures/10000201000006F7000002AA71D4CCE5.png"/>
  <manifest:file-entry manifest:media-type="image/png" manifest:full-path="Pictures/10000201000006EA0000033C94DB0EAB.png"/>
  <manifest:file-entry manifest:media-type="image/png" manifest:full-path="Pictures/10000201000006E500000307157182F4.png"/>
  <manifest:file-entry manifest:media-type="image/png" manifest:full-path="Pictures/1000000000000469000002D5F86C7FA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채우기와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기본값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size-asian="20pt"/>
    </style:style>
  </office:automatic-styles>
  <office:body>
    <office:presentation>
      <draw:page draw:name="page1" draw:style-name="dp1" draw:master-page-name="기본값" presentation:presentation-page-layout-name="AL1T0">
        <draw:frame draw:style-name="gr1" draw:text-style-name="P1" draw:layer="layout" svg:width="27.999cm" svg:height="15.724cm" svg:x="0.076cm" svg:y="2.668cm">
          <draw:image xlink:href="Pictures/1000000000000502000002D0EEC217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0">
        <draw:frame draw:style-name="gr1" draw:text-style-name="P1" draw:layer="layout" svg:width="27.999cm" svg:height="9.894cm" svg:x="0.001cm" svg:y="2.906cm">
          <draw:image xlink:href="Pictures/10000201000006F100000274F9085C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0">
        <draw:frame draw:style-name="gr1" draw:text-style-name="P1" draw:layer="layout" svg:width="27.999cm" svg:height="11.132cm" svg:x="0.001cm" svg:y="3.8cm">
          <draw:image xlink:href="Pictures/10000201000006E8000002BF4AD97D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0">
        <draw:frame draw:style-name="gr1" draw:text-style-name="P1" draw:layer="layout" svg:width="27.999cm" svg:height="13.052cm" svg:x="0cm" svg:y="1.4cm">
          <draw:image xlink:href="Pictures/10000201000006F00000033C5A5936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0">
        <draw:frame draw:style-name="gr1" draw:text-style-name="P1" draw:layer="layout" svg:width="27.999cm" svg:height="10.709cm" svg:x="0.001cm" svg:y="0.691cm">
          <draw:image xlink:href="Pictures/10000201000006F7000002AA71D4CC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0">
        <draw:frame draw:style-name="gr1" draw:text-style-name="P1" draw:layer="layout" svg:width="27.999cm" svg:height="17.979cm" svg:x="-0.399cm" svg:y="1cm">
          <draw:image xlink:href="Pictures/1000000000000469000002D5F86C7F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1T0">
        <draw:frame draw:style-name="gr1" draw:text-style-name="P1" draw:layer="layout" svg:width="16.783cm" svg:height="20.999cm" svg:x="5.6cm" svg:y="-0.4cm">
          <draw:image xlink:href="Pictures/10000000000004530000056946E581A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1T0">
        <draw:frame draw:style-name="gr1" draw:text-style-name="P1" draw:layer="layout" svg:width="27.999cm" svg:height="11.427cm" svg:x="0.001cm" svg:y="0.573cm">
          <draw:image xlink:href="Pictures/10000201000006FA000002D950215EF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1T0">
        <draw:frame draw:style-name="gr1" draw:text-style-name="P1" draw:layer="layout" svg:width="27.999cm" svg:height="11.586cm" svg:x="0.001cm" svg:y="3.014cm">
          <draw:image xlink:href="Pictures/10000201000006F0000002DFA69964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1T0">
        <draw:frame draw:style-name="gr1" draw:text-style-name="P1" draw:layer="layout" svg:width="27.999cm" svg:height="10.25cm" svg:x="0cm" svg:y="4.55cm">
          <draw:image xlink:href="Pictures/10000201000006FD0000028FF73D02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 presentation:presentation-page-layout-name="AL1T0">
        <draw:frame draw:style-name="gr1" draw:text-style-name="P1" draw:layer="layout" svg:width="27.999cm" svg:height="13.121cm" svg:x="0.001cm" svg:y="2.679cm">
          <draw:image xlink:href="Pictures/10000201000006DC00000337BA46E7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기본값" presentation:presentation-page-layout-name="AL1T0">
        <draw:frame draw:style-name="gr1" draw:text-style-name="P1" draw:layer="layout" svg:width="27.999cm" svg:height="12.293cm" svg:x="0.001cm" svg:y="1.8cm">
          <draw:image xlink:href="Pictures/10000201000006E500000307157182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기본값" presentation:presentation-page-layout-name="AL1T0">
        <draw:frame draw:style-name="gr1" draw:text-style-name="P1" draw:layer="layout" svg:width="27.999cm" svg:height="11.284cm" svg:x="0cm" svg:y="1.716cm">
          <draw:image xlink:href="Pictures/10000201000006DF000002C50BFF92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기본값" presentation:presentation-page-layout-name="AL1T0">
        <draw:frame draw:style-name="gr1" draw:text-style-name="P1" draw:layer="layout" svg:width="27.999cm" svg:height="11.494cm" svg:x="0.001cm" svg:y="1.506cm">
          <draw:image xlink:href="Pictures/10000201000006E1000002D33263EC3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기본값" presentation:presentation-page-layout-name="AL1T0">
        <draw:frame draw:style-name="gr1" draw:text-style-name="P1" draw:layer="layout" svg:width="27.999cm" svg:height="13.097cm" svg:x="0.001cm" svg:y="1.4cm">
          <draw:image xlink:href="Pictures/10000201000006EA0000033C94DB0E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기본값" presentation:presentation-page-layout-name="AL1T0">
        <draw:frame draw:style-name="gr1" draw:text-style-name="P1" draw:layer="layout" svg:width="27.999cm" svg:height="11.637cm" svg:x="0cm" svg:y="1.878cm">
          <draw:image xlink:href="Pictures/10000201000006E1000002DCF29452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기본값" presentation:presentation-page-layout-name="AL1T0">
        <draw:frame draw:style-name="gr1" draw:text-style-name="P1" draw:layer="layout" svg:width="27.999cm" svg:height="13.182cm" svg:x="-1.733cm" svg:y="2.886cm">
          <draw:image xlink:href="Pictures/10000201000006E7000003408651E4B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기본값" presentation:presentation-page-layout-name="AL1T0">
        <draw:frame draw:style-name="gr1" draw:text-style-name="P1" draw:layer="layout" svg:width="27.999cm" svg:height="10.614cm" svg:x="-2.888cm" svg:y="3.544cm">
          <draw:image xlink:href="Pictures/10000201000006F7000002A4EEDA21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기본값" presentation:presentation-page-layout-name="AL1T0">
        <draw:frame draw:style-name="gr1" draw:text-style-name="P1" draw:layer="layout" svg:width="27.999cm" svg:height="11.293cm" svg:x="-3.201cm" svg:y="4.96cm">
          <draw:image xlink:href="Pictures/10000201000006E5000002C871334A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기본값" presentation:presentation-page-layout-name="AL1T0">
        <draw:frame draw:style-name="gr1" draw:text-style-name="P1" draw:layer="layout" svg:width="27.999cm" svg:height="10.022cm" svg:x="-1.83cm" svg:y="3.936cm">
          <draw:image xlink:href="Pictures/10000201000006EB0000027AB50008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기본값" presentation:presentation-page-layout-name="AL1T0">
        <draw:frame draw:style-name="gr1" draw:text-style-name="P1" draw:layer="layout" svg:width="27.999cm" svg:height="10.367cm" svg:x="-0.627cm" svg:y="3.09cm">
          <draw:image xlink:href="Pictures/10000201000006F1000002928C201B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기본값" presentation:presentation-page-layout-name="AL1T0">
        <draw:frame draw:style-name="gr1" draw:text-style-name="P1" draw:layer="layout" svg:width="27.999cm" svg:height="12.907cm" svg:x="-5.197cm" svg:y="4.538cm">
          <draw:image xlink:href="Pictures/10000201000006F700000336F6EB5B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기본값" presentation:presentation-page-layout-name="AL1T0">
        <draw:frame draw:style-name="gr1" draw:text-style-name="P1" draw:layer="layout" svg:width="27.999cm" svg:height="12.525cm" svg:x="3.318cm" svg:y="2.54cm">
          <draw:image xlink:href="Pictures/10000201000006F10000031B38D225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기본값" presentation:presentation-page-layout-name="AL1T0">
        <draw:frame draw:style-name="gr1" draw:text-style-name="P1" draw:layer="layout" svg:width="27.999cm" svg:height="12.175cm" svg:x="0.001cm" svg:y="1.625cm">
          <draw:image xlink:href="Pictures/10000201000006FD0000030A47350B6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기본값" presentation:presentation-page-layout-name="AL1T0">
        <draw:frame draw:style-name="gr1" draw:text-style-name="P1" draw:layer="layout" svg:width="27.999cm" svg:height="11.897cm" svg:x="-1.445cm" svg:y="4.923cm">
          <draw:image xlink:href="Pictures/10000201000006FA000002F7D7CD38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기본값" presentation:presentation-page-layout-name="AL1T0"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기본값" presentation:presentation-page-layout-name="AL1T0"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기본값" presentation:presentation-page-layout-name="AL1T0"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숫자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hyun park</meta:initial-creator>
    <meta:creation-date>2026-06-19T07:18:32.19</meta:creation-date>
    <meta:editing-duration>PT7H33M59S</meta:editing-duration>
    <meta:editing-cycles>4</meta:editing-cycles>
    <dc:date>2026-06-22T08:39:02.95</dc:date>
    <meta:generator>OpenOffice/4.1.15$Win32 OpenOffice.org_project/4115m2$Build-9813</meta:generator>
    <meta:document-statistic meta:object-count="102"/>
  </office:meta>
</office:document-meta>
</file>